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media-type="application/vnd.oasis.opendocument.text" manifest:version="1.4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4">
  <office:scripts/>
  <office:font-face-decls>
    <style:font-face style:font-family-generic="swiss" style:name="Arial Unicode MS" svg:font-family="'Arial Unicode MS'"/>
    <style:font-face style:font-family-generic="system" style:font-pitch="variable" style:name="Arial Unicode MS1" svg:font-family="'Arial Unicode MS'"/>
    <style:font-face style:font-family-generic="swiss" style:font-pitch="variable" style:name="Liberation Sans" svg:font-family="'Liberation Sans'"/>
    <style:font-face style:font-family-generic="roman" style:font-pitch="variable" style:name="Liberation Serif" svg:font-family="'Liberation Serif'"/>
    <style:font-face style:font-family-generic="system" style:font-pitch="variable" style:name="Songti SC" svg:font-family="'Songti SC'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Текст, оформленный стилем</text:p>
      <text:p text:style-name="Text_20_body">Тест, с кастомизацией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4">
  <office:meta>
    <meta:creation-date>2026-05-21T19:29:24.615154000</meta:creation-date>
    <dc:date>2026-05-22T03:29:53.847024Z</dc:date>
    <meta:editing-duration>PT0.013S</meta:editing-duration>
    <meta:editing-cycles>3</meta:editing-cycles>
    <meta:generator>StarOffice/8$Win32 OpenOffice.org_project/680m18$Build-9161</meta:generator>
    <meta:document-statistic meta:character-count="46" meta:image-count="0" meta:non-whitespace-character-count="42" meta:object-count="0" meta:page-count="1" meta:paragraph-count="2" meta:table-count="0" meta:word-count="6"/>
  </office:meta>
</office:document-meta>
</file>