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6pt" officeooo:rsid="001af76e" officeooo:paragraph-rsid="001af76e" style:font-size-asian="16pt" style:font-size-complex="16pt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312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Заголовок</text:h>
      <text:p text:style-name="Text_20_body">Текст, оформленный стилем</text:p>
      <text:p text:style-name="P1">Тест, с кастомизацией</text:p>
      <text:p text:style-name="P2">Текст с ещё одной кастомизацией</text:p>
      <text:h text:style-name="P3" text:outline-level="2">Ещё один заголовок</text:h>
      <table:table table:name="Table2" table:style-name="Table2" table:template-name="Default Style">
        <table:table-column table:style-name="Table2.A" table:number-columns-repeated="2"/>
        <table:table-row>
          <table:table-cell table:style-name="Table2.A1" office:value-type="string">
            <text:p text:style-name="Table_20_Heading">Заголовок таблицы первый</text:p>
          </table:table-cell>
          <table:table-cell table:style-name="Table2.B1" office:value-type="string">
            <text:p text:style-name="Table_20_Heading">Заголовок таблицы второй</text:p>
          </table:table-cell>
        </table:table-row>
        <table:table-row table:style-name="Table2.2">
          <table:table-cell table:style-name="Table2.A2" office:value-type="string">
            <text:p text:style-name="Table_20_Contents">Содержание ячейки <text:span text:style-name="T1">1.1 продолжение описания</text:span></text:p>
          </table:table-cell>
          <table:table-cell table:style-name="Table2.B2" office:value-type="string">
            <text:p text:style-name="Table_20_Contents">Содержание ячейки <text:span text:style-name="T1">1.2 — продолжение описания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9:29:24.615154000</meta:creation-date>
    <dc:date>2026-05-31T18:41:06.468384000</dc:date>
    <meta:editing-duration>PT1H14M29S</meta:editing-duration>
    <meta:editing-cycles>32</meta:editing-cycles>
    <meta:generator>LibreOffice/26.2.3.2$MacOSX_AARCH64 LibreOffice_project/70e089b17412e4cb7773e41413306b17a2328c34</meta:generator>
    <meta:document-statistic meta:table-count="1" meta:image-count="0" meta:object-count="0" meta:page-count="1" meta:paragraph-count="9" meta:word-count="31" meta:character-count="238" meta:non-whitespace-character-count="215"/>
  </office:meta>
</office:document-meta>
</file>